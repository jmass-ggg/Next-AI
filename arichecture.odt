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writing-mode="lr-tb"/>
    </style:style>
    <style:style style:name="P3"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paragraph-properties fo:margin-top="0in" fo:margin-bottom="0.1965in" style:contextual-spacing="false" style:writing-mode="lr-tb"/>
    </style:style>
    <style:style style:name="P6" style:family="paragraph" style:parent-style-name="Heading_20_1">
      <style:text-properties officeooo:rsid="001d03c6" officeooo:paragraph-rsid="001d03c6"/>
    </style:style>
    <style:style style:name="P7" style:family="paragraph" style:parent-style-name="Heading_20_3">
      <style:text-properties officeooo:rsid="001d03c6" officeooo:paragraph-rsid="001d03c6"/>
    </style:style>
    <style:style style:name="P8" style:family="paragraph" style:parent-style-name="Text_20_body">
      <style:text-properties officeooo:rsid="001d03c6" officeooo:paragraph-rsid="001d03c6"/>
    </style:style>
    <style:style style:name="P9" style:family="paragraph" style:parent-style-name="Preformatted_20_Text">
      <style:paragraph-properties style:writing-mode="lr-tb"/>
    </style:style>
    <style:style style:name="P10" style:family="paragraph" style:parent-style-name="Heading_20_1">
      <style:text-properties officeooo:rsid="001d03c6"/>
    </style:style>
    <style:style style:name="P11" style:family="paragraph" style:parent-style-name="Text_20_body">
      <style:text-properties officeooo:rsid="001d03c6"/>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oject Documentation</text:h>
      <text:h text:style-name="Heading_20_2" text:outline-level="2">Project Title</text:h>
      <text:p text:style-name="Text_20_body"><text:span text:style-name="Strong_20_Emphasis">CareerCompass AI: An AI-Based Career Roadmap, Syllabus Guidance, and Hackathon Team Finder System</text:span></text:p>
      <text:p text:style-name="Horizontal_20_Line"/>
      <text:h text:style-name="Heading_20_2" text:outline-level="2">1. Introduction</text:h>
      <text:p text:style-name="Text_20_body">CareerCompass AI is a student guidance system designed to help BCA, B.Tech, and other technology students understand why they are studying specific subjects and how those subjects connect to real-world careers. Many students join technical courses without proper knowledge of career paths, required skills, and the purpose of each subject in their syllabus. This system solves that problem by explaining subjects, recommending suitable careers, generating career roadmaps, analyzing skill gaps, and helping students find teammates for hackathons or projects.</text:p>
      <text:p text:style-name="Text_20_body">The system uses raw Python for backend processing, raw SQL for database operations, vanilla JavaScript for frontend interaction, and a simple AI-based recommendation algorithm developed using Python logic. The AI part recommends careers and teammates based on student interests, skills, subjects, and availability.</text:p>
      <text:p text:style-name="Horizontal_20_Line"/>
      <text:h text:style-name="Heading_20_2" text:outline-level="2">2. Problem Statement</text:h>
      <text:p text:style-name="Text_20_body">Many students who join BCA, B.Tech, or similar technical courses are confused about their syllabus and career direction. They often study subjects like DBMS, Programming, Mathematics, Networking, and JavaScript without understanding their real-life importance. Students also face difficulty choosing a suitable career path and finding people with matching skills for hackathons or projects.</text:p>
      <text:p text:style-name="Text_20_body">There is a need for a system that can guide students by explaining subjects, connecting them with career options, recommending roadmaps, and helping them build teams based on skills.</text:p>
      <text:p text:style-name="Horizontal_20_Line"/>
      <text:h text:style-name="Heading_20_2" text:outline-level="2">3. Objectives of the System</text:h>
      <text:p text:style-name="Text_20_body">The main objectives of CareerCompass AI are:</text:p>
      <text:list text:style-name="L1">
        <text:list-item>
          <text:p text:style-name="P12">To help students understand why they are studying each subject.</text:p>
        </text:list-item>
        <text:list-item>
          <text:p text:style-name="P12">To show real-world uses of syllabus subjects.</text:p>
        </text:list-item>
        <text:list-item>
          <text:p text:style-name="P12">To recommend suitable career paths based on student interests and skills.</text:p>
        </text:list-item>
        <text:list-item>
          <text:p text:style-name="P12">To generate step-by-step career roadmaps.</text:p>
        </text:list-item>
        <text:list-item>
          <text:p text:style-name="P12">To identify skill gaps between the student’s current skills and required career skills.</text:p>
        </text:list-item>
        <text:list-item>
          <text:p text:style-name="P12"><text:soft-page-break/>To help students find teammates for hackathons and projects.</text:p>
        </text:list-item>
        <text:list-item>
          <text:p text:style-name="P12">To provide an admin panel for managing subjects, careers, skills, and roadmap data.</text:p>
        </text:list-item>
        <text:list-item>
          <text:p text:style-name="P12">To implement the system using raw Python, raw SQL, and JavaScript without using major frameworks.</text:p>
        </text:list-item>
      </text:list>
      <text:p text:style-name="Horizontal_20_Line"/>
      <text:h text:style-name="Heading_20_2" text:outline-level="2">4. Scope of the System</text:h>
      <text:p text:style-name="Text_20_body">The system is mainly designed for students from technical courses such as BCA, B.Tech, B.Sc CS, and similar IT-related programs. It can be used by students who want to understand their syllabus, explore careers in technology, and find suitable learning paths.</text:p>
      <text:p text:style-name="Text_20_body">The system includes student registration, subject explanation, career recommendation, roadmap generation, skill gap analysis, progress tracking, and hackathon team matching.</text:p>
      <text:p text:style-name="Horizontal_20_Line"/>
      <text:h text:style-name="Heading_20_2" text:outline-level="2">5. Existing System</text:h>
      <text:p text:style-name="Text_20_body">In the existing system, students usually depend on teachers, seniors, YouTube videos, or random internet searches to understand career options. There is no single system that explains the connection between subjects and careers in a structured way. Students may also find it difficult to search for teammates with the required skills for hackathons or academic projects.</text:p>
      <text:p text:style-name="Text_20_body">Limitations of the existing system:</text:p>
      <text:list text:style-name="L2">
        <text:list-item>
          <text:p text:style-name="P13">No proper subject-to-career connection.</text:p>
        </text:list-item>
        <text:list-item>
          <text:p text:style-name="P13">No personalized career recommendation.</text:p>
        </text:list-item>
        <text:list-item>
          <text:p text:style-name="P13">No roadmap based on student interests.</text:p>
        </text:list-item>
        <text:list-item>
          <text:p text:style-name="P13">No skill gap analysis.</text:p>
        </text:list-item>
        <text:list-item>
          <text:p text:style-name="P13">No proper system for finding hackathon teammates.</text:p>
        </text:list-item>
        <text:list-item>
          <text:p text:style-name="P13">Students depend on scattered information from different sources.</text:p>
        </text:list-item>
      </text:list>
      <text:p text:style-name="Horizontal_20_Line"/>
      <text:h text:style-name="Heading_20_2" text:outline-level="2">6. Proposed System</text:h>
      <text:p text:style-name="Text_20_body">The proposed system, CareerCompass AI, provides a centralized platform where students can understand their syllabus, explore career options, get career roadmaps, and find teammates for hackathons.</text:p>
      <text:p text:style-name="Text_20_body">The system allows students to create their profile by entering course, semester, interests, and skills. Based on this information, the system recommends suitable careers. Students can also search for subjects and view why those subjects are important, where they are used, and which careers are related to them.</text:p>
      <text:p text:style-name="Text_20_body">The system also includes a hackathon team finder feature where students can search for teammates <text:soft-page-break/>based on required skills such as frontend, backend, database, AI, design, or presentation.</text:p>
      <text:p text:style-name="Horizontal_20_Line"/>
      <text:h text:style-name="Heading_20_2" text:outline-level="2">7. Users of the System</text:h>
      <text:p text:style-name="Text_20_body">The system has mainly two types of users:</text:p>
      <text:h text:style-name="Heading_20_3" text:outline-level="3">7.1 Student</text:h>
      <text:p text:style-name="Text_20_body">Students can register, log in, view subjects, understand syllabus importance, get career recommendations, view roadmaps, update skills, track progress, and search for hackathon teammates.</text:p>
      <text:h text:style-name="Heading_20_3" text:outline-level="3">7.2 Admin</text:h>
      <text:p text:style-name="Text_20_body">Admin can manage subjects, careers, skills, roadmap steps, syllabus explanations, and student data. Admin can add, update, delete, and view system records.</text:p>
      <text:p text:style-name="Horizontal_20_Line"/>
      <text:h text:style-name="Heading_20_2" text:outline-level="2">8. Functional Requirements</text:h>
      <text:p text:style-name="Text_20_body">Functional requirements describe what the system should do.</text:p>
      <text:h text:style-name="Heading_20_3" text:outline-level="3">FR1: Student Registration</text:h>
      <text:p text:style-name="Text_20_body">The system shall allow new students to register by entering their name, email, password, course, semester, interests, and skills.</text:p>
      <text:h text:style-name="Heading_20_3" text:outline-level="3">FR2: Student Login</text:h>
      <text:p text:style-name="Text_20_body">The system shall allow registered students to log in using their email and password.</text:p>
      <text:h text:style-name="Heading_20_3" text:outline-level="3">FR3: Student Profile Management</text:h>
      <text:p text:style-name="Text_20_body">The system shall allow students to create, view, update, and delete their profile information.</text:p>
      <text:h text:style-name="Heading_20_3" text:outline-level="3">FR4: Subject Search</text:h>
      <text:p text:style-name="Text_20_body">The system shall allow students to search subjects by subject name, course, or semester.</text:p>
      <text:h text:style-name="Heading_20_3" text:outline-level="3">FR5: Subject Explanation</text:h>
      <text:p text:style-name="Text_20_body">The system shall display the purpose of each subject, real-life uses, related skills, and connected careers.</text:p>
      <text:h text:style-name="Heading_20_3" text:outline-level="3">FR6: Career Recommendation</text:h>
      <text:p text:style-name="Text_20_body">The system shall recommend suitable careers based on student interests, skills, and subjects.</text:p>
      <text:h text:style-name="Heading_20_3" text:outline-level="3">FR7: Career Match Score</text:h>
      <text:p text:style-name="Text_20_body">The system shall calculate a career match percentage using raw Python AI logic.</text:p>
      <text:h text:style-name="Heading_20_3" text:outline-level="3"><text:soft-page-break/>FR8: Career Roadmap Generation</text:h>
      <text:p text:style-name="Text_20_body">The system shall generate a step-by-step roadmap for the selected career.</text:p>
      <text:h text:style-name="Heading_20_3" text:outline-level="3">FR9: Skill Gap Analysis</text:h>
      <text:p text:style-name="Text_20_body">The system shall compare the student’s current skills with the required skills of a career and display missing skills.</text:p>
      <text:h text:style-name="Heading_20_3" text:outline-level="3">FR10: Roadmap Progress Tracking</text:h>
      <text:p text:style-name="Text_20_body">The system shall allow students to mark roadmap steps as not started, in progress, or completed.</text:p>
      <text:h text:style-name="Heading_20_3" text:outline-level="3">FR11: Roadmap Change Feature</text:h>
      <text:p text:style-name="Text_20_body">The system shall allow students to change their selected career roadmap. When the roadmap changes, the system shall save the old roadmap in history and generate a new roadmap.</text:p>
      <text:h text:style-name="Heading_20_3" text:outline-level="3">FR12: Hackathon Team Finder</text:h>
      <text:p text:style-name="Text_20_body">The system shall allow students to search for teammates based on required roles and skills.</text:p>
      <text:h text:style-name="Heading_20_3" text:outline-level="3">FR13: Teammate Recommendation</text:h>
      <text:p text:style-name="Text_20_body">The system shall recommend suitable students for hackathon teams using skill matching, interest matching, and availability.</text:p>
      <text:h text:style-name="Heading_20_3" text:outline-level="3">FR14: Team Request System</text:h>
      <text:p text:style-name="Text_20_body">The system shall allow students to send team requests to recommended teammates.</text:p>
      <text:h text:style-name="Heading_20_3" text:outline-level="3">FR15: Request Accept or Reject</text:h>
      <text:p text:style-name="Text_20_body">The system shall allow students to accept or reject hackathon team requests.</text:p>
      <text:h text:style-name="Heading_20_3" text:outline-level="3">FR16: Admin Login</text:h>
      <text:p text:style-name="Text_20_body">The system shall allow admin users to log in to the admin panel.</text:p>
      <text:h text:style-name="Heading_20_3" text:outline-level="3">FR17: Manage Subjects</text:h>
      <text:p text:style-name="Text_20_body">The admin shall be able to add, view, update, and delete subject details.</text:p>
      <text:h text:style-name="Heading_20_3" text:outline-level="3">FR18: Manage Careers</text:h>
      <text:p text:style-name="Text_20_body">The admin shall be able to add, view, update, and delete career details.</text:p>
      <text:h text:style-name="Heading_20_3" text:outline-level="3">FR19: Manage Roadmaps</text:h>
      <text:p text:style-name="Text_20_body">The admin shall be able to create and update roadmap steps for different careers.</text:p>
      <text:h text:style-name="Heading_20_3" text:outline-level="3">FR20: Manage Skills</text:h>
      <text:p text:style-name="Text_20_body">The admin shall be able to add, view, update, and delete skills.</text:p>
      <text:h text:style-name="Heading_20_3" text:outline-level="3"><text:soft-page-break/>FR21: Dashboard</text:h>
      <text:p text:style-name="Text_20_body">The system shall provide a dashboard showing student profile, recommended careers, roadmap progress, and hackathon requests.</text:p>
      <text:p text:style-name="Horizontal_20_Line"/>
      <text:h text:style-name="Heading_20_2" text:outline-level="2">9. Non-Functional Requirements</text:h>
      <text:p text:style-name="Text_20_body">Non-functional requirements describe the quality and performance of the system.</text:p>
      <text:h text:style-name="Heading_20_3" text:outline-level="3">9.1 Usability</text:h>
      <text:p text:style-name="Text_20_body">The system should be simple and easy to use for students.</text:p>
      <text:h text:style-name="Heading_20_3" text:outline-level="3">9.2 Performance</text:h>
      <text:p text:style-name="Text_20_body">The system should give recommendations and search results quickly.</text:p>
      <text:h text:style-name="Heading_20_3" text:outline-level="3">9.3 Security</text:h>
      <text:p text:style-name="Text_20_body">The system should protect student login details and personal information.</text:p>
      <text:h text:style-name="Heading_20_3" text:outline-level="3">9.4 Reliability</text:h>
      <text:p text:style-name="Text_20_body">The system should work correctly and store data safely in the database.</text:p>
      <text:h text:style-name="Heading_20_3" text:outline-level="3">9.5 Maintainability</text:h>
      <text:p text:style-name="Text_20_body">The system should be easy to update with new subjects, careers, and roadmap data.</text:p>
      <text:h text:style-name="Heading_20_3" text:outline-level="3">9.6 Scalability</text:h>
      <text:p text:style-name="Text_20_body">The system should be able to handle more students, subjects, and careers in the future.</text:p>
      <text:h text:style-name="Heading_20_3" text:outline-level="3">9.7 Compatibility</text:h>
      <text:p text:style-name="Text_20_body">The system should run on a normal web browser using HTML, CSS, and JavaScript.</text:p>
      <text:p text:style-name="Horizontal_20_Line"/>
      <text:h text:style-name="Heading_20_2" text:outline-level="2">10. Main Modules of the System</text:h>
      <text:h text:style-name="Heading_20_3" text:outline-level="3">10.1 Student Module</text:h>
      <text:p text:style-name="Text_20_body">This module handles student registration, login, profile management, skill entry, interest selection, roadmap viewing, and progress tracking.</text:p>
      <text:h text:style-name="Heading_20_3" text:outline-level="3">10.2 Subject Guidance Module</text:h>
      <text:p text:style-name="Text_20_body">This module helps students understand subjects by showing their purpose, real-life applications, related skills, and connected careers.</text:p>
      <text:h text:style-name="Heading_20_3" text:outline-level="3"><text:soft-page-break/>10.3 Career Recommendation Module</text:h>
      <text:p text:style-name="Text_20_body">This module recommends careers to students based on their interests, subjects, and skills.</text:p>
      <text:h text:style-name="Heading_20_3" text:outline-level="3">10.4 Roadmap Module</text:h>
      <text:p text:style-name="Text_20_body">This module generates a step-by-step learning roadmap for the selected career.</text:p>
      <text:h text:style-name="Heading_20_3" text:outline-level="3">10.5 Skill Gap Analysis Module</text:h>
      <text:p text:style-name="Text_20_body">This module compares current student skills with required career skills and shows missing skills.</text:p>
      <text:h text:style-name="Heading_20_3" text:outline-level="3">10.6 Hackathon Team Finder Module</text:h>
      <text:p text:style-name="Text_20_body">This module helps students find teammates based on skills, interests, roles, and availability.</text:p>
      <text:h text:style-name="Heading_20_3" text:outline-level="3">10.7 Admin Module</text:h>
      <text:p text:style-name="Text_20_body">This module allows the admin to manage subjects, careers, skills, roadmaps, and system data.</text:p>
      <text:p text:style-name="Horizontal_20_Line"/>
      <text:h text:style-name="Heading_20_2" text:outline-level="2">11. AI Logic Used in the System</text:h>
      <text:p text:style-name="Text_20_body">The AI in the system is based on a recommendation algorithm created using raw Python. It does not use external AI frameworks. The algorithm compares student interests and skills with career requirements.</text:p>
      <text:p text:style-name="Text_20_body">For career recommendation, the system calculates a match score using:</text:p>
      <text:list text:style-name="L3">
        <text:list-item>
          <text:p text:style-name="P14">Skill match</text:p>
        </text:list-item>
        <text:list-item>
          <text:p text:style-name="P14">Interest match</text:p>
        </text:list-item>
        <text:list-item>
          <text:p text:style-name="P14">Subject relevance</text:p>
        </text:list-item>
        <text:list-item>
          <text:p text:style-name="P14">Career requirement match</text:p>
        </text:list-item>
      </text:list>
      <text:p text:style-name="Text_20_body">For hackathon teammate recommendation, the system calculates a match score using:</text:p>
      <text:list text:style-name="L4">
        <text:list-item>
          <text:p text:style-name="P15">Required skill match</text:p>
        </text:list-item>
        <text:list-item>
          <text:p text:style-name="P15">Student interest match</text:p>
        </text:list-item>
        <text:list-item>
          <text:p text:style-name="P15">Availability</text:p>
        </text:list-item>
        <text:list-item>
          <text:p text:style-name="P15">Previous project experience</text:p>
        </text:list-item>
      </text:list>
      <text:p text:style-name="Text_20_body">Example scoring formula:</text:p>
      <text:p text:style-name="Text_20_body">Final Score = Skill Match + Interest Match + Availability + Experience Score</text:p>
      <text:p text:style-name="Text_20_body">The career or teammate with the highest score is recommended to the student.</text:p>
      <text:p text:style-name="Horizontal_20_Line"/>
      <text:h text:style-name="Heading_20_2" text:outline-level="2"><text:soft-page-break/>12. CRUD Operations in the System</text:h>
      <text:p text:style-name="Text_20_body">The system uses CRUD operations in multiple modules.</text:p>
      <text:h text:style-name="Heading_20_3" text:outline-level="3">Create</text:h>
      <text:p text:style-name="Text_20_body">The system can create student profiles, subjects, careers, skills, roadmaps, and hackathon requests.</text:p>
      <text:h text:style-name="Heading_20_3" text:outline-level="3">Read</text:h>
      <text:p text:style-name="Text_20_body">The system can display subject details, career information, student profile, roadmap steps, and recommended teammates.</text:p>
      <text:h text:style-name="Heading_20_3" text:outline-level="3">Update</text:h>
      <text:p text:style-name="Text_20_body">The system can update student skills, roadmap progress, subject details, career details, and team request status.</text:p>
      <text:h text:style-name="Heading_20_3" text:outline-level="3">Delete</text:h>
      <text:p text:style-name="Text_20_body">The system can delete saved roadmaps, subjects, careers, skills, and team requests when required.</text:p>
      <text:p text:style-name="Horizontal_20_Line"/>
      <text:h text:style-name="Heading_20_2" text:outline-level="2">13. Technologies Used</text:h>
      <text:p text:style-name="Text_20_body">The system will be developed using the following technologies:</text:p>
      <text:list text:style-name="L5">
        <text:list-item>
          <text:p text:style-name="P16">Frontend: HTML, CSS, JavaScript</text:p>
        </text:list-item>
        <text:list-item>
          <text:p text:style-name="P16">Backend: Raw Python</text:p>
        </text:list-item>
        <text:list-item>
          <text:p text:style-name="P16">Database: SQLite or MySQL</text:p>
        </text:list-item>
        <text:list-item>
          <text:p text:style-name="P16">Query Language: Raw SQL</text:p>
        </text:list-item>
        <text:list-item>
          <text:p text:style-name="P16">AI Logic: Raw Python recommendation algorithm</text:p>
        </text:list-item>
      </text:list>
      <text:p text:style-name="Text_20_body">The system will not use major frameworks such as Django, Flask, React, TensorFlow, or scikit-learn.</text:p>
      <text:p text:style-name="Horizontal_20_Line"/>
      <text:h text:style-name="Heading_20_2" text:outline-level="2">14. Expected Output</text:h>
      <text:p text:style-name="Text_20_body">After using the system, students will be able to:</text:p>
      <text:list text:style-name="L6">
        <text:list-item>
          <text:p text:style-name="P17">Understand why they are studying specific subjects.</text:p>
        </text:list-item>
        <text:list-item>
          <text:p text:style-name="P17">Know the real-life use of their syllabus.</text:p>
        </text:list-item>
        <text:list-item>
          <text:p text:style-name="P17">Find suitable career options.</text:p>
        </text:list-item>
        <text:list-item>
          <text:p text:style-name="P17">Follow a proper career roadmap.</text:p>
        </text:list-item>
        <text:list-item>
          <text:p text:style-name="P17">Identify missing skills.</text:p>
        </text:list-item>
        <text:list-item>
          <text:p text:style-name="P17"><text:soft-page-break/>Track their learning progress.</text:p>
        </text:list-item>
        <text:list-item>
          <text:p text:style-name="P17">Find teammates for hackathons or projects.</text:p>
        </text:list-item>
      </text:list>
      <text:p text:style-name="Horizontal_20_Line"/>
      <text:h text:style-name="Heading_20_2" text:outline-level="2">15. Conclusion</text:h>
      <text:p text:style-name="Text_20_body">CareerCompass AI is a useful and innovative system for students who are confused about their syllabus and career direction. It connects academic subjects with real-world careers and provides personalized roadmaps using raw Python-based AI logic. The hackathon team finder feature makes the system more practical by helping students connect with others based on skills and interests.</text:p>
      <text:p text:style-name="Text_20_body">This system is better than a normal CRUD-based project because it includes student guidance, AI recommendation, roadmap generation, skill gap analysis, and team matching features. It solves a real problem faced by many technical students and can be developed using raw Python, raw SQL, and JavaScript.</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22T21:09:02.999602883</dc:date>
    <meta:editing-duration>PT5H14M13S</meta:editing-duration>
    <meta:editing-cycles>10</meta:editing-cycles>
    <meta:generator>LibreOffice/24.2.7.2$Linux_X86_64 LibreOffice_project/420$Build-2</meta:generator>
    <meta:document-statistic meta:table-count="0" meta:image-count="0" meta:object-count="0" meta:page-count="8" meta:paragraph-count="161" meta:word-count="1711" meta:character-count="11377" meta:non-whitespace-character-count="9861"/>
  </office:meta>
</office:document-meta>
</file>